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36f3c" officeooo:paragraph-rsid="00036f3c"/>
    </style:style>
    <style:style style:name="P2" style:family="paragraph" style:parent-style-name="Text_20_body">
      <style:text-properties officeooo:rsid="000abe6d" officeooo:paragraph-rsid="00040140"/>
    </style:style>
    <style:style style:name="P3" style:family="paragraph" style:parent-style-name="Heading_20_2">
      <style:text-properties style:text-underline-style="solid" style:text-underline-width="auto" style:text-underline-color="font-color" officeooo:rsid="000d98d5" officeooo:paragraph-rsid="000d98d5"/>
    </style:style>
    <style:style style:name="P4" style:family="paragraph" style:parent-style-name="Text_20_body">
      <style:text-properties officeooo:paragraph-rsid="000d98d5"/>
    </style:style>
    <style:style style:name="P5" style:family="paragraph" style:parent-style-name="Heading_20_2">
      <style:text-properties style:text-underline-style="solid" style:text-underline-width="auto" style:text-underline-color="font-color" officeooo:rsid="000dd227" officeooo:paragraph-rsid="000dd227"/>
    </style:style>
    <style:style style:name="P6" style:family="paragraph" style:parent-style-name="Text_20_body">
      <style:text-properties officeooo:rsid="000dd227" officeooo:paragraph-rsid="000dd227"/>
    </style:style>
    <style:style style:name="P7" style:family="paragraph" style:parent-style-name="Text_20_body">
      <style:text-properties officeooo:rsid="000fc476" officeooo:paragraph-rsid="000fc476"/>
    </style:style>
    <style:style style:name="P8" style:family="paragraph" style:parent-style-name="Heading_20_2">
      <style:text-properties style:text-underline-style="solid" style:text-underline-width="auto" style:text-underline-color="font-color" officeooo:rsid="0018d073" officeooo:paragraph-rsid="0018d073"/>
    </style:style>
    <style:style style:name="P9" style:family="paragraph" style:parent-style-name="Text_20_body">
      <style:text-properties style:text-underline-style="none" officeooo:rsid="0018d073" officeooo:paragraph-rsid="0018d073"/>
    </style:style>
    <style:style style:name="P10" style:family="paragraph" style:parent-style-name="Text_20_body">
      <style:text-properties officeooo:rsid="00074e7f" officeooo:paragraph-rsid="00074e7f"/>
    </style:style>
    <style:style style:name="P11" style:family="paragraph" style:parent-style-name="Subtitle">
      <style:text-properties style:text-underline-style="solid" style:text-underline-width="auto" style:text-underline-color="font-color" officeooo:rsid="00036f3c" officeooo:paragraph-rsid="00036f3c"/>
    </style:style>
    <style:style style:name="P12" style:family="paragraph" style:parent-style-name="Text_20_body">
      <style:text-properties style:text-underline-style="none" officeooo:rsid="00036f3c" officeooo:paragraph-rsid="00036f3c"/>
    </style:style>
    <style:style style:name="P13" style:family="paragraph" style:parent-style-name="Text_20_body">
      <style:text-properties style:text-underline-style="none" officeooo:rsid="000b3ec1" officeooo:paragraph-rsid="000b3ec1"/>
    </style:style>
    <style:style style:name="P14" style:family="paragraph" style:parent-style-name="Text_20_body">
      <style:text-properties style:text-underline-style="none" officeooo:rsid="0011252f" officeooo:paragraph-rsid="0011252f"/>
    </style:style>
    <style:style style:name="P15" style:family="paragraph" style:parent-style-name="Text_20_body">
      <style:text-properties style:text-underline-style="none" officeooo:rsid="00128a82" officeooo:paragraph-rsid="00128a82"/>
    </style:style>
    <style:style style:name="P16" style:family="paragraph" style:parent-style-name="Text_20_body">
      <style:text-properties style:text-underline-style="none" officeooo:rsid="00144093" officeooo:paragraph-rsid="00144093"/>
    </style:style>
    <style:style style:name="P17" style:family="paragraph" style:parent-style-name="Heading">
      <style:text-properties style:text-underline-style="solid" style:text-underline-width="auto" style:text-underline-color="font-color" officeooo:rsid="00128a82" officeooo:paragraph-rsid="00128a82"/>
    </style:style>
    <style:style style:name="P18" style:family="paragraph" style:parent-style-name="Subtitle">
      <style:text-properties style:font-name="Ink Free" style:text-underline-style="solid" style:text-underline-width="auto" style:text-underline-color="font-color" officeooo:rsid="0019c1ca" officeooo:paragraph-rsid="0019c1ca"/>
    </style:style>
    <style:style style:name="P19" style:family="paragraph" style:parent-style-name="Text_20_body">
      <style:text-properties style:font-name="Liberation Serif" officeooo:rsid="0019c1ca" officeooo:paragraph-rsid="0019c1ca"/>
    </style:style>
    <style:style style:name="P20" style:family="paragraph" style:parent-style-name="Text_20_body" style:list-style-name="L1">
      <style:text-properties style:font-name="Liberation Serif" officeooo:rsid="001bb764" officeooo:paragraph-rsid="001bb764"/>
    </style:style>
    <style:style style:name="T1" style:family="text">
      <style:text-properties officeooo:rsid="000bab64"/>
    </style:style>
    <style:style style:name="T2" style:family="text">
      <style:text-properties officeooo:rsid="000b3ec1"/>
    </style:style>
    <style:style style:name="T3" style:family="text">
      <style:text-properties officeooo:rsid="0015c10b"/>
    </style:style>
    <style:style style:name="T4" style:family="text">
      <style:text-properties officeooo:rsid="000d98d5"/>
    </style:style>
    <style:style style:name="T5" style:family="text">
      <style:text-properties officeooo:rsid="001597c0"/>
    </style:style>
    <style:style style:name="T6" style:family="text">
      <style:text-properties officeooo:rsid="0016b65f"/>
    </style:style>
    <style:style style:name="T7" style:family="text">
      <style:text-properties officeooo:rsid="001bb764"/>
    </style:style>
    <style:style style:name="T8" style:family="text">
      <style:text-properties officeooo:rsid="00128a82"/>
    </style:style>
    <style:style style:name="T9" style:family="text">
      <style:text-properties style:text-position="super 58%"/>
    </style:style>
    <style:style style:name="T10" style:family="text">
      <style:text-properties officeooo:rsid="000abe6d"/>
    </style:style>
    <style:style style:name="T11" style:family="text">
      <style:text-properties style:font-name="Liberation Serif"/>
    </style:style>
    <style:style style:name="T12" style:family="text">
      <style:text-properties officeooo:rsid="001747b0"/>
    </style:style>
    <style:style style:name="T13" style:family="text">
      <style:text-properties officeooo:rsid="0017e15b"/>
    </style:style>
    <style:style style:name="T14" style:family="text">
      <style:text-properties officeooo:rsid="00190325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fin d’année</text:p>
      <text:p text:style-name="P2"/>
      <text:p text:style-name="P2">Projet ayant pour but de clôturer l’année avec un site qui compile tout le savoir de ces dernières années sur le thème d’un jeu de science fiction : TITANFALL, <text:span text:style-name="T1">jeu de tir militaire dans un futur lointain</text:span>. À savoir ; un quizz, avec des questions aléatoires ; un combat en POO ; un pendu en javascript ; un jeu mystère. <text:span text:style-name="T2">Demande à l’utilisateur de se connecter sur le site et, le cas échéant, de s’inscrire. Son score est sauvegardé et apparaît dans un tableau des scores. </text:span><text:span text:style-name="T3">Vulgarisation volontaire pour que tout type de public puisse être capable de pouvoir jouer</text:span></text:p>
      <text:h text:style-name="P3" text:outline-level="2">Contraintes :</text:h>
      <text:p text:style-name="P4">- <text:span text:style-name="T4">programmation orientée objet </text:span><text:span text:style-name="T5">(POO)</text:span></text:p>
      <text:p text:style-name="P4">- <text:span text:style-name="T4">concevoir une jointure entre des tables en SQL</text:span></text:p>
      <text:p text:style-name="P4">- <text:span text:style-name="T4">gestion administrateur</text:span></text:p>
      <text:p text:style-name="P4">- <text:span text:style-name="T4">4 niveaux différents avec accès spécifique </text:span><text:span text:style-name="T6">sur une carte</text:span><text:span text:style-name="T4"> (pas de retour en arrière)</text:span></text:p>
      <text:p text:style-name="P4">- <text:span text:style-name="T4">pas de clicker ou de jeu des paires (dû à une utilisation trop prononcée dans des précédents)</text:span></text:p>
      <text:p text:style-name="P4">- <text:span text:style-name="T4">gestion d’événement (un effet sur les clicks ou quelque chose du genre)</text:span></text:p>
      <text:p text:style-name="P4">- <text:span text:style-name="T4">aucun projet précédemment réalisé ne peut être réutilisé (du moins dans la forme)</text:span></text:p>
      <text:h text:style-name="P5" text:outline-level="2">Spécifications techniques :</text:h>
      <text:p text:style-name="P6">Utilisation de nombreux langages de programmation et de technologies tels que ;</text:p>
      <text:p text:style-name="P6">HTML, CSS, PHP, SQL, JS (javascript)</text:p>
      <text:p text:style-name="P7">La base de données contiendra les données utilisateurs ainsi qu’administrateur et leurs scores</text:p>
      <text:h text:style-name="P8" text:outline-level="2">Apparence visuelle :</text:h>
      <text:p text:style-name="P9">Ressemblance ayant pour but de cibler l’ambiance de la série avec une ergonomie unique (meh) et un <text:span text:style-name="T7">style visuel</text:span> bien spécifique</text:p>
      <text:p text:style-name="P10"/>
      <text:p text:style-name="P11">niveau 1 : quiz</text:p>
      <text:p text:style-name="P12"/>
      <text:p text:style-name="P13">Questions en rapport avec le thème et posées de façon aléatoire. Réponses stockées dans une BDD</text:p>
      <text:p text:style-name="P14">° bouton permettant de revenir à l’accueil</text:p>
      <text:p text:style-name="P14">° la question posée aura plusieurs réponses en dessous et le joueur devra sélectionner la bonne réponse pour gagner des points, autrement il n’en engrangera pas</text:p>
      <text:p text:style-name="P14">° les questions pourront inclure des images à deviner</text:p>
      <text:p text:style-name="P11"><text:soft-page-break/>niveau 2 : combat</text:p>
      <text:p text:style-name="P12"/>
      <text:p text:style-name="P13">combat entre 2 personnages du thème (sélectionnable par l’utilisateur) avec utilisation de fonctions d’héritage et de polymorphisme</text:p>
      <text:p text:style-name="P14">° retour à l’accueil possible</text:p>
      <text:p text:style-name="P14">° personnages classés en fonction de leur… <text:span text:style-name="T8">intensité (les pilotes puis les titans)</text:span></text:p>
      <text:p text:style-name="P15">° le joueur pourra sélectionner le personnage qu’il souhaite</text:p>
      <text:p text:style-name="P15">° l’ennemi est sélectionné aléatoirement</text:p>
      <text:p text:style-name="P15">° le combat sera automatique pour l’ennemi, pour le joueur c’est encore incertain</text:p>
      <text:p text:style-name="P15">° les résultats dépendront des pv restants du personnage</text:p>
      <text:p text:style-name="P11">niveau 3 : <text:span text:style-name="T8">421</text:span></text:p>
      <text:p text:style-name="P13"/>
      <text:p text:style-name="P13"><text:span text:style-name="T8">jeux de dés compliqué à comprendre.</text:span></text:p>
      <text:p text:style-name="P16">° Utilisation très probable de fonctions aléatoire</text:p>
      <text:p text:style-name="P16">° points dépendants du résultat du jeu</text:p>
      <text:p text:style-name="P12"><text:span text:style-name="T9"/></text:p>
      <text:p text:style-name="P11">niveau 4 : <text:span text:style-name="T10">jsp</text:span></text:p>
      <text:p text:style-name="P12"/>
      <text:p text:style-name="P13">pas <text:span text:style-name="T11">d’idée</text:span> <text:span text:style-name="T12">(jeu des 7 différences ?)</text:span></text:p>
      <text:p text:style-name="P13"/>
      <text:p text:style-name="P17">Risques potentiels :</text:p>
      <text:p text:style-name="P15">trop grande ambition et trop de temps pris pour régler des problèmes non-importants du fait de l’incompréhension <text:span text:style-name="T13">et du blo</text:span><text:span text:style-name="T14">c</text:span><text:span text:style-name="T13">age sur un problème spécifique</text:span></text:p>
      <text:p text:style-name="P18">planning</text:p>
      <text:p text:style-name="P19"/>
      <text:list text:style-name="L1">
        <text:list-item>
          <text:p text:style-name="P20">connexion et inscription</text:p>
        </text:list-item>
        <text:list-item>
          <text:p text:style-name="P20">jeu 1</text:p>
        </text:list-item>
        <text:list-item>
          <text:p text:style-name="P20">jeu 2</text:p>
        </text:list-item>
        <text:list-item>
          <text:p text:style-name="P20">jeu 3</text:p>
        </text:list-item>
        <text:list-item>
          <text:p text:style-name="P20">jeu 4</text:p>
          <text:p text:style-name="P20"><text:soft-page-break/>les différentes étapes seront dévoilées lorsque totalement fonctionnelles. Le CSS (style visuel) sera ajouté à la fin, quand l’ensemble sera complètement termin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3T13:12:18.375000000</meta:creation-date>
    <dc:date>2026-04-10T11:04:16.067529500</dc:date>
    <meta:editing-duration>PT4H23S</meta:editing-duration>
    <meta:editing-cycles>27</meta:editing-cycles>
    <meta:generator>LibreOffice/26.2.2.2$Windows_X86_64 LibreOffice_project/1f77d10d6938fd34972958f64b2bcfa54f8b1ba5</meta:generator>
    <meta:document-statistic meta:table-count="0" meta:image-count="0" meta:object-count="0" meta:page-count="3" meta:paragraph-count="44" meta:word-count="479" meta:character-count="2858" meta:non-whitespace-character-count="2429"/>
  </office:meta>
</office:document-meta>
</file>