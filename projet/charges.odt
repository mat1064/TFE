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1.ttf" manifest:media-type="application/x-font-ttf"/>
  <manifest:file-entry manifest:full-path="Fonts/Font_Linux_Libertine_G_2.ttf" manifest:media-type="application/x-font-ttf"/>
  <manifest:file-entry manifest:full-path="Fonts/Font_Linux_Libertine_G_3.ttf" manifest:media-type="application/x-font-ttf"/>
  <manifest:file-entry manifest:full-path="Fonts/Font_Linux_Libertine_G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nk Free" svg:font-family="'Ink Free'" style:font-family-generic="roman" style:font-pitch="variable"/>
    <style:font-face style:name="Ink Free1" svg:font-family="'Ink Free'"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Title" style:master-page-name="Standard">
      <style:paragraph-properties fo:margin-top="0.423cm" fo:margin-bottom="0.212cm" style:contextual-spacing="false" fo:line-height="100%" style:page-number="1"/>
      <style:text-properties style:text-underline-style="solid" style:text-underline-width="auto" style:text-underline-color="font-color"/>
    </style:style>
    <style:style style:name="P2" style:family="paragraph" style:parent-style-name="Standard">
      <style:paragraph-properties fo:margin-left="0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3" style:family="paragraph" style:parent-style-name="Heading_20_2" style:list-style-name="WWNum1">
      <style:paragraph-properties fo:margin-left="0cm" fo:margin-right="0cm" fo:text-indent="0cm" style:auto-text-indent="false"/>
      <style:text-properties style:text-underline-style="solid" style:text-underline-width="auto" style:text-underline-color="font-color"/>
    </style:style>
    <style:style style:name="P4" style:family="paragraph" style:parent-style-name="Subtitle">
      <style:text-properties style:text-underline-style="solid" style:text-underline-width="auto" style:text-underline-color="font-color"/>
    </style:style>
    <style:style style:name="P5" style:family="paragraph" style:parent-style-name="Standard">
      <style:paragraph-properties fo:margin-left="0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6" style:family="paragraph" style:parent-style-name="Standard">
      <style:paragraph-properties fo:margin-left="0cm" fo:margin-right="0cm" fo:margin-top="0.423cm" fo:margin-bottom="0.212cm" style:contextual-spacing="false" fo:line-height="100%" fo:text-align="lef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ans" fo:font-size="14pt" fo:font-style="normal" style:text-underline-style="solid" style:text-underline-width="auto" style:text-underline-color="font-color" fo:font-weight="normal" style:font-name-asian="Liberation Sans2" style:font-size-asian="14pt" style:font-style-asian="normal" style:font-weight-asian="normal" style:font-name-complex="Liberation Sans2" style:font-size-complex="14pt" style:font-style-complex="normal" style:font-weight-complex="normal"/>
    </style:style>
    <style:style style:name="P7" style:family="paragraph" style:parent-style-name="Subtitle">
      <style:text-properties style:text-line-through-style="solid" style:text-line-through-type="single" style:font-name="Ink Free" style:text-underline-style="solid" style:text-underline-width="auto" style:text-underline-color="font-color" style:font-name-asian="Ink Free1" style:font-name-complex="Ink Free1"/>
    </style:style>
    <style:style style:name="P8" style:family="paragraph" style:parent-style-name="Standard">
      <style:paragraph-properties fo:margin-left="1.27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9" style:family="paragraph" style:parent-style-name="Standard">
      <style:paragraph-properties fo:margin-left="1.27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style>
    <style:style style:name="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097ff" style:font-name-asian="Liberation Serif1" style:font-size-asian="12pt" style:font-style-asian="normal" style:font-weight-asian="normal" style:font-name-complex="Liberation Serif1" style:font-size-complex="1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12382"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officeooo:rsid="000eab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fin d’année</text:p>
      <text:p text:style-name="P2"/>
      <text:p text:style-name="P2">Projet ayant pour but de clôturer l’année avec un site qui compile tout le savoir de ces dernières années sur le thème d’un jeu de science fiction : TITANFALL, jeu de tir militaire dans un futur lointain. À savoir ; un quizz, avec des questions aléatoires ; un combat en POO ; un pendu en javascript ; un jeu mystère. Demande à l’utilisateur de se connecter sur le site et, le cas échéant, de s’inscrire. Son score est sauvegardé et apparaît dans un tableau des scores. Vulgarisation volontaire pour que tout type de public puisse être capable de pouvoir jouer</text:p>
      <text:list text:style-name="WWNum1">
        <text:list-item>
          <text:list>
            <text:list-item>
              <text:p text:style-name="P3">Contraintes :</text:p>
            </text:list-item>
          </text:list>
        </text:list-item>
      </text:list>
      <text:p text:style-name="P2">- programmation orientée objet (POO)</text:p>
      <text:p text:style-name="P2">- concevoir une jointure entre des tables en SQL</text:p>
      <text:p text:style-name="P2">- gestion administrateur</text:p>
      <text:p text:style-name="P2">- 4 niveaux différents avec accès spécifique sur une carte (pas de retour en arrière)</text:p>
      <text:p text:style-name="P2">- pas de clicker ou de jeu des paires (dû à une utilisation trop prononcée dans des précédents)</text:p>
      <text:p text:style-name="P2">- gestion d’événement (un effet sur les clicks ou quelque chose du genre)</text:p>
      <text:p text:style-name="P2">- aucun projet précédemment réalisé ne peut être réutilisé (du moins dans la forme)</text:p>
      <text:list text:continue-numbering="true" text:style-name="WWNum1">
        <text:list-item>
          <text:list>
            <text:list-item>
              <text:p text:style-name="P3">Spécifications techniques :</text:p>
            </text:list-item>
          </text:list>
        </text:list-item>
      </text:list>
      <text:p text:style-name="P2">Utilisation de nombreux langages de programmation et de technologies tels que ;</text:p>
      <text:p text:style-name="P2">HTML, CSS, PHP, SQL, JS (javascript)</text:p>
      <text:p text:style-name="P2">La base de données contiendra les données utilisateurs ainsi qu’administrateur et leurs scores</text:p>
      <text:list text:continue-numbering="true" text:style-name="WWNum1">
        <text:list-item>
          <text:list>
            <text:list-item>
              <text:p text:style-name="P3">Apparence visuelle :</text:p>
            </text:list-item>
          </text:list>
        </text:list-item>
      </text:list>
      <text:p text:style-name="P2">Ressemblance ayant pour but de cibler l’ambiance de la série avec une ergonomie unique (meh) et un style visuel bien spécifique</text:p>
      <text:p text:style-name="P2"/>
      <text:p text:style-name="P4">niveau 1 : quiz</text:p>
      <text:p text:style-name="P2"/>
      <text:p text:style-name="P2">Questions en rapport avec le thème et posées de façon aléatoire. Réponses stockées dans une BDD</text:p>
      <text:p text:style-name="P2">° bouton permettant de revenir à l’accueil</text:p>
      <text:p text:style-name="P2">° la question posée aura plusieurs réponses en dessous et le joueur devra sélectionner la bonne réponse pour gagner des points, autrement il n’en engrangera pas</text:p>
      <text:p text:style-name="P2">° les questions pourront inclure des images à deviner</text:p>
      <text:p text:style-name="P4"><text:soft-page-break/>niveau 2 : combat</text:p>
      <text:p text:style-name="P2"/>
      <text:p text:style-name="P2">combat entre 2 personnages du thème (sélectionnable par l’utilisateur) avec utilisation de fonctions d’héritage et de polymorphisme</text:p>
      <text:p text:style-name="P2">° retour à l’accueil possible</text:p>
      <text:p text:style-name="P2">° personnages classés en fonction de leur… intensité (les pilotes puis les titans)</text:p>
      <text:p text:style-name="P2">° le joueur pourra sélectionner le personnage qu’il souhaite</text:p>
      <text:p text:style-name="P2">° l’ennemi est sélectionné aléatoirement</text:p>
      <text:p text:style-name="P2">° le combat sera automatique pour l’ennemi, pour le joueur c’est encore incertain</text:p>
      <text:p text:style-name="P2">° les résultats dépendront des pv restants du personnage</text:p>
      <text:p text:style-name="P4">niveau 3 : 421</text:p>
      <text:p text:style-name="P2"/>
      <text:p text:style-name="P2">jeux de dés compliqué à comprendre.</text:p>
      <text:p text:style-name="P2">° Utilisation très probable de fonctions aléatoire</text:p>
      <text:p text:style-name="P2">° points dépendants du résultat du jeu</text:p>
      <text:p text:style-name="P5"/>
      <text:p text:style-name="P4">niveau 4 : jsp</text:p>
      <text:p text:style-name="P2"/>
      <text:p text:style-name="P2">pas d’idée (jeu des 7 différences ?)</text:p>
      <text:p text:style-name="P2"/>
      <text:p text:style-name="P6">Risques potentiels :</text:p>
      <text:p text:style-name="P2">trop grande ambition et trop de temps pris pour régler des problèmes non-importants du fait de l’incompréhension et du blocage sur un problème spécifique</text:p>
      <text:p text:style-name="P7">planning</text:p>
      <text:p text:style-name="P8">à la base, j’avais une idée d’explication par des images</text:p>
      <text:p text:style-name="P9"><text:span text:style-name="T1"><text:line-break/>- </text:span><text:span text:style-name="T2">(</text:span><text:span text:style-name="T3">page d’accueil</text:span><text:span text:style-name="T1"> : espace avec des planètes qui représentent les différent niveaux, cliquables selon la progression</text:span><text:span text:style-name="T2">) </text:span><text:span text:style-name="T4">concept à oublier</text:span></text:p>
      <text:p text:style-name="P9"><text:span text:style-name="T1">- </text:span><text:span text:style-name="T3">niveau 1</text:span><text:span text:style-name="T1"> : un fond spécifique avec une musique attitrée. Quizz avec les questions stockées et posées aléatoirement</text:span></text:p>
      <text:p text:style-name="P9"><text:span text:style-name="T1">- </text:span><text:span text:style-name="T3">niv 2</text:span><text:span text:style-name="T1"> : fond et musique propres. Combat entre 2 entités (pilote ou titan) en fonction des stats</text:span></text:p>
      <text:p text:style-name="P9"><text:span text:style-name="T1">- </text:span><text:span text:style-name="T3">niv 3</text:span><text:span text:style-name="T1"> : 421. Dés aléatoires avec 3 <text:s/>conditions de victoire (421, suite, nombre identiques)</text:span></text:p>
      <text:p text:style-name="P9"><text:soft-page-break/><text:span text:style-name="T1">- </text:span><text:span text:style-name="T3">niv 4</text:span><text:span text:style-name="T1"> : jsp, les autres ont proposé un démineur, un black jack alors jsp quoi faire</text:span></text:p>
      <text:p text:style-name="P8"/>
      <text:p text:style-name="P8">les différentes étapes seront dévoilées lorsque totalement fonctionnelles. Le CSS (style visuel) sera <text:span text:style-name="T5">procédur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nk Free" svg:font-family="'Ink Free'" style:font-family-generic="roman" style:font-pitch="variable"/>
    <style:font-face style:name="Ink Free1" svg:font-family="'Ink Free'"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chapter">
      <style:paragraph-properties fo:margin-left="0cm" fo:margin-right="0cm" fo:margin-top="0.353cm" fo:margin-bottom="0.212cm" style:contextual-spacing="false" fo:line-height="100%" fo:text-indent="0cm" style:auto-text-indent="false" fo:keep-with-next="always"/>
      <style:text-properties style:font-name="Liberation Sans"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font-weight-complex="bold"/>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font-weight-complex="bold"/>
    </style:style>
    <style:style style:name="Subtitle" style:family="paragraph" style:parent-style-name="normal" style:next-style-name="Standard" style:default-outline-level="" style:class="chapter">
      <style:paragraph-properties fo:margin-top="0.106cm" fo:margin-bottom="0.212cm" style: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date>2026-06-11T19:13:07.844297800</dc:date>
    <meta:editing-duration>PT1M25S</meta:editing-duration>
    <meta:editing-cycles>3</meta:editing-cycles>
    <meta:document-statistic meta:table-count="0" meta:image-count="0" meta:object-count="0" meta:page-count="3" meta:paragraph-count="45" meta:word-count="556" meta:character-count="3344" meta:non-whitespace-character-count="2828"/>
  </office:meta>
</office:document-meta>
</file>